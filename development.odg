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loext:fill-use-slide-background="false" draw:textarea-horizontal-align="justify" draw:textarea-vertical-align="middle" draw:auto-grow-height="false" fo:min-height="4.06cm" fo:min-width="6.38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3.11cm" fo:min-width="5.12cm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3.41cm" fo:min-width="5.12cm" loext:decorative="false"/>
      <style:paragraph-properties style:writing-mode="lr-tb"/>
    </style:style>
    <style:style style:name="gr4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3.41cm" fo:min-width="6.13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6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8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6.88cm" svg:height="4.31cm" svg:x="1.91cm" svg:y="2.38cm">
          <text:p text:style-name="P1">raspi3b with<text:line-break/>battery_manager.py<text:line-break/><text:line-break/>wireguard client<text:line-break/>192.168.168.54:5000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62cm" svg:height="3.36cm" svg:x="9.58cm" svg:y="2.84cm">
          <text:p text:style-name="P3"><text:span text:style-name="T1">Fritzbox</text:span><text:span text:style-name="T1"><text:line-break/></text:span>net 192.168.168.0/24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62cm" svg:height="3.66cm" svg:x="1.51cm" svg:y="9.95cm">
          <text:p text:style-name="P1">Fritzbox wireguard server</text:p>
          <text:p text:style-name="P1">net 192.168.178.0/24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32cm" svg:y1="9.95cm" svg:x2="15.2cm" svg:y2="4.52cm" draw:start-shape="id1" draw:start-glue-point="0" draw:end-shape="id2" draw:end-glue-point="1" svg:d="M4320 9950v-1875h11381v-3555h-501" svg:viewBox="0 0 11382 5431">
          <text:p text:style-name="P1"/>
        </draw:connector>
        <draw:custom-shape draw:style-name="gr5" draw:text-style-name="P2" xml:id="id4" draw:id="id4" draw:layer="layout" svg:width="6.63cm" svg:height="3.66cm" svg:x="8.19cm" svg:y="15.02cm">
          <text:p text:style-name="P1">Raspi3b</text:p>
          <text:p text:style-name="P1">with evcc<text:line-break/>192.168.178.58:7070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62cm" svg:height="3.66cm" svg:x="12.52cm" svg:y="9.95cm">
          <text:p text:style-name="P1"><text:span text:style-name="T1">Victron CerboGX</text:span><text:span text:style-name="T1"><text:line-break/></text:span>192.168.178.61<text:line-break/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9cm" svg:y1="4.535cm" svg:x2="9.58cm" svg:y2="4.52cm" draw:start-shape="id3" draw:start-glue-point="1" draw:end-shape="id2" draw:end-glue-point="3" svg:d="M8790 4535h420v-15h370" svg:viewBox="0 0 791 16">
          <text:p/>
        </draw:connector>
        <draw:connector draw:style-name="gr6" draw:text-style-name="P1" draw:layer="layout" svg:x1="7.13cm" svg:y1="11.78cm" svg:x2="8.19cm" svg:y2="16.85cm" draw:start-shape="id1" draw:start-glue-point="1" draw:end-shape="id4" draw:end-glue-point="3" svg:d="M7130 11780h530v5070h530" svg:viewBox="0 0 1061 5071">
          <text:p/>
        </draw:connector>
        <draw:connector draw:style-name="gr6" draw:text-style-name="P1" draw:layer="layout" svg:x1="7.13cm" svg:y1="11.78cm" svg:x2="12.52cm" svg:y2="11.78cm" draw:start-shape="id1" draw:start-glue-point="1" draw:end-shape="id5" draw:end-glue-point="3" svg:d="M7130 11780h5390" svg:viewBox="0 0 5391 1">
          <text:p/>
        </draw:connector>
        <draw:frame draw:style-name="gr7" draw:text-style-name="P5" draw:layer="layout" svg:width="4.29cm" svg:height="0.962cm" svg:x="9.69cm" svg:y="7.05cm">
          <draw:text-box>
            <text:p>Internet</text:p>
          </draw:text-box>
        </draw:frame>
        <draw:frame draw:style-name="gr8" draw:text-style-name="P5" draw:layer="layout" svg:width="11.25cm" svg:height="1.12cm" svg:x="6.07cm" svg:y="1.36cm">
          <draw:text-box>
            <text:p>Remote Software Develop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7T16:34:29.450350000</meta:creation-date>
    <dc:date>2026-05-17T18:46:10.931223800</dc:date>
    <meta:editing-duration>PT1H51M10S</meta:editing-duration>
    <meta:editing-cycles>2</meta:editing-cycles>
    <meta:generator>LibreOffice/25.8.6.2$Windows_X86_64 LibreOffice_project/b4b39682cd9868fa725bc664aff94278d315bd04</meta:generator>
    <meta:document-statistic meta:object-count="11"/>
  </office:meta>
</office:document-meta>
</file>